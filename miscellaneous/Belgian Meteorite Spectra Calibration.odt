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258F4568CD87B0A8331.png" manifest:media-type="image/png"/>
  <manifest:file-entry manifest:full-path="Pictures/10000001000007D000000258CB8C945A85F019E5.png" manifest:media-type="image/png"/>
  <manifest:file-entry manifest:full-path="Pictures/10000001000003E800000258500483C5644AC20F.png" manifest:media-type="image/png"/>
  <manifest:file-entry manifest:full-path="Pictures/10000001000003E80000025886993785362C6809.png" manifest:media-type="image/png"/>
  <manifest:file-entry manifest:full-path="Pictures/10000001000003E80000025831BDC9DA01D15DC4.png" manifest:media-type="image/png"/>
  <manifest:file-entry manifest:full-path="Pictures/10000001000003E800000258454DA3CB9739BDAD.png" manifest:media-type="image/png"/>
  <manifest:file-entry manifest:full-path="Pictures/10000001000003E80000025843506D83E74F6EBC.png" manifest:media-type="image/png"/>
  <manifest:file-entry manifest:full-path="Pictures/1000000100001194000008340B2B21BE0EB25C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596e" officeooo:paragraph-rsid="0039a38d"/>
    </style:style>
    <style:style style:name="P2" style:family="paragraph" style:parent-style-name="Standard">
      <style:text-properties officeooo:rsid="0005dded" officeooo:paragraph-rsid="0039a38d"/>
    </style:style>
    <style:style style:name="P3" style:family="paragraph" style:parent-style-name="Standard">
      <style:text-properties officeooo:rsid="0006d89d" officeooo:paragraph-rsid="0006d89d"/>
    </style:style>
    <style:style style:name="P4" style:family="paragraph" style:parent-style-name="Standard">
      <style:text-properties officeooo:rsid="0006d89d" officeooo:paragraph-rsid="0039a38d"/>
    </style:style>
    <style:style style:name="P5" style:family="paragraph" style:parent-style-name="Standard">
      <style:text-properties officeooo:rsid="0006fa56" officeooo:paragraph-rsid="0039a38d"/>
    </style:style>
    <style:style style:name="P6" style:family="paragraph" style:parent-style-name="Standard">
      <style:text-properties fo:font-weight="bold" officeooo:rsid="0006fa56" officeooo:paragraph-rsid="0006fa56" style:font-weight-asian="bold" style:font-weight-complex="bold"/>
    </style:style>
    <style:style style:name="P7" style:family="paragraph" style:parent-style-name="Standard">
      <style:text-properties fo:font-weight="bold" officeooo:rsid="000b18f4" officeooo:paragraph-rsid="000b18f4" style:font-weight-asian="bold" style:font-weight-complex="bold"/>
    </style:style>
    <style:style style:name="P8" style:family="paragraph" style:parent-style-name="Standard">
      <style:text-properties fo:font-weight="bold" officeooo:rsid="001146a8" officeooo:paragraph-rsid="001146a8" style:font-weight-asian="bold" style:font-weight-complex="bold"/>
    </style:style>
    <style:style style:name="P9" style:family="paragraph" style:parent-style-name="Standard">
      <style:text-properties fo:font-weight="bold" officeooo:rsid="0014deab" officeooo:paragraph-rsid="0014deab" style:font-weight-asian="bold" style:font-weight-complex="bold"/>
    </style:style>
    <style:style style:name="P10" style:family="paragraph" style:parent-style-name="Standard">
      <style:text-properties fo:font-weight="bold" officeooo:rsid="001dc42f" officeooo:paragraph-rsid="001dc42f" style:font-weight-asian="bold" style:font-weight-complex="bold"/>
    </style:style>
    <style:style style:name="P11" style:family="paragraph" style:parent-style-name="Standard">
      <style:text-properties fo:font-weight="bold" officeooo:rsid="001dc42f" officeooo:paragraph-rsid="001f665e" style:font-weight-asian="bold" style:font-weight-complex="bold"/>
    </style:style>
    <style:style style:name="P12" style:family="paragraph" style:parent-style-name="Standard">
      <style:text-properties fo:font-weight="bold" officeooo:rsid="0023b4ba" officeooo:paragraph-rsid="0023b4ba" style:font-weight-asian="bold" style:font-weight-complex="bold"/>
    </style:style>
    <style:style style:name="P13" style:family="paragraph" style:parent-style-name="Standard">
      <style:text-properties fo:font-weight="bold" officeooo:rsid="002592cb" officeooo:paragraph-rsid="002592cb" style:font-weight-asian="bold" style:font-weight-complex="bold"/>
    </style:style>
    <style:style style:name="P14" style:family="paragraph" style:parent-style-name="Standard">
      <style:text-properties fo:font-weight="bold" officeooo:rsid="002a54d8" officeooo:paragraph-rsid="002a54d8" style:font-weight-asian="bold" style:font-weight-complex="bold"/>
    </style:style>
    <style:style style:name="P15" style:family="paragraph" style:parent-style-name="Standard">
      <style:text-properties fo:font-weight="bold" officeooo:rsid="002b0e96" officeooo:paragraph-rsid="002b0e96" style:font-weight-asian="bold" style:font-weight-complex="bold"/>
    </style:style>
    <style:style style:name="P16" style:family="paragraph" style:parent-style-name="Standard">
      <style:text-properties fo:font-weight="bold" officeooo:rsid="002c4984" officeooo:paragraph-rsid="002c4984" style:font-weight-asian="bold" style:font-weight-complex="bold"/>
    </style:style>
    <style:style style:name="P17" style:family="paragraph" style:parent-style-name="Standard">
      <style:text-properties fo:font-weight="bold" officeooo:rsid="002cb793" officeooo:paragraph-rsid="002cb793" style:font-weight-asian="bold" style:font-weight-complex="bold"/>
    </style:style>
    <style:style style:name="P18" style:family="paragraph" style:parent-style-name="Standard">
      <style:text-properties fo:font-weight="bold" officeooo:rsid="002cb793" officeooo:paragraph-rsid="002e87f9" style:font-weight-asian="bold" style:font-weight-complex="bold"/>
    </style:style>
    <style:style style:name="P19" style:family="paragraph" style:parent-style-name="Standard">
      <style:text-properties fo:font-weight="bold" officeooo:rsid="002cb793" officeooo:paragraph-rsid="00312599" style:font-weight-asian="bold" style:font-weight-complex="bold"/>
    </style:style>
    <style:style style:name="P20" style:family="paragraph" style:parent-style-name="Standard">
      <style:text-properties fo:font-weight="bold" officeooo:paragraph-rsid="0027ae9e"/>
    </style:style>
    <style:style style:name="P21" style:family="paragraph" style:parent-style-name="Standard">
      <style:text-properties fo:font-weight="bold" officeooo:rsid="0027ae9e" officeooo:paragraph-rsid="0028b2f0"/>
    </style:style>
    <style:style style:name="P22" style:family="paragraph" style:parent-style-name="Standard">
      <style:text-properties fo:font-weight="bold" officeooo:rsid="0029468a" officeooo:paragraph-rsid="0029468a"/>
    </style:style>
    <style:style style:name="P23" style:family="paragraph" style:parent-style-name="Standard">
      <style:text-properties officeooo:rsid="000735f3" officeooo:paragraph-rsid="000735f3"/>
    </style:style>
    <style:style style:name="P24" style:family="paragraph" style:parent-style-name="Standard">
      <style:text-properties officeooo:rsid="00091b2d" officeooo:paragraph-rsid="000b18f4"/>
    </style:style>
    <style:style style:name="P25" style:family="paragraph" style:parent-style-name="Standard">
      <style:text-properties officeooo:rsid="000b18f4" officeooo:paragraph-rsid="000b18f4"/>
    </style:style>
    <style:style style:name="P26" style:family="paragraph" style:parent-style-name="Standard">
      <style:text-properties officeooo:rsid="000cba5c" officeooo:paragraph-rsid="000cba5c"/>
    </style:style>
    <style:style style:name="P27" style:family="paragraph" style:parent-style-name="Standard">
      <style:text-properties officeooo:rsid="0010152f" officeooo:paragraph-rsid="0010152f"/>
    </style:style>
    <style:style style:name="P28" style:family="paragraph" style:parent-style-name="Standard">
      <style:text-properties officeooo:rsid="001146a8" officeooo:paragraph-rsid="001146a8"/>
    </style:style>
    <style:style style:name="P29" style:family="paragraph" style:parent-style-name="Standard">
      <style:text-properties officeooo:rsid="00115770" officeooo:paragraph-rsid="00115770"/>
    </style:style>
    <style:style style:name="P30" style:family="paragraph" style:parent-style-name="Standard">
      <style:text-properties officeooo:rsid="0014deab" officeooo:paragraph-rsid="0014deab"/>
    </style:style>
    <style:style style:name="P31" style:family="paragraph" style:parent-style-name="Standard">
      <style:text-properties officeooo:rsid="001621f8" officeooo:paragraph-rsid="001621f8"/>
    </style:style>
    <style:style style:name="P32" style:family="paragraph" style:parent-style-name="Standard">
      <style:text-properties officeooo:rsid="001b6b8a" officeooo:paragraph-rsid="002e87f9"/>
    </style:style>
    <style:style style:name="P33" style:family="paragraph" style:parent-style-name="Standard">
      <style:text-properties officeooo:rsid="0031b39f" officeooo:paragraph-rsid="0031b39f"/>
    </style:style>
    <style:style style:name="P34" style:family="paragraph" style:parent-style-name="Standard">
      <style:text-properties fo:font-weight="normal" officeooo:rsid="0006fa56" officeooo:paragraph-rsid="0039a38d" style:font-weight-asian="normal" style:font-weight-complex="normal"/>
    </style:style>
    <style:style style:name="P35" style:family="paragraph" style:parent-style-name="Standard">
      <style:text-properties fo:font-weight="normal" officeooo:rsid="001dc42f" officeooo:paragraph-rsid="001dc42f" style:font-weight-asian="normal" style:font-weight-complex="normal"/>
    </style:style>
    <style:style style:name="P36" style:family="paragraph" style:parent-style-name="Standard">
      <style:text-properties fo:font-weight="normal" officeooo:rsid="001e2ab7" officeooo:paragraph-rsid="001f665e" style:font-weight-asian="normal" style:font-weight-complex="normal"/>
    </style:style>
    <style:style style:name="P37" style:family="paragraph" style:parent-style-name="Standard">
      <style:text-properties fo:font-weight="normal" officeooo:rsid="001e2ab7" officeooo:paragraph-rsid="00207ce3" style:font-weight-asian="normal" style:font-weight-complex="normal"/>
    </style:style>
    <style:style style:name="P38" style:family="paragraph" style:parent-style-name="Standard">
      <style:text-properties fo:font-weight="normal" officeooo:rsid="0006d89d" officeooo:paragraph-rsid="0039a38d" style:font-weight-asian="normal" style:font-weight-complex="normal"/>
    </style:style>
    <style:style style:name="P39" style:family="paragraph" style:parent-style-name="Standard">
      <style:text-properties fo:font-weight="normal" officeooo:rsid="0006d89d" officeooo:paragraph-rsid="0034308a" style:font-weight-asian="normal" style:font-weight-complex="normal"/>
    </style:style>
    <style:style style:name="P40" style:family="paragraph" style:parent-style-name="Standard">
      <style:text-properties fo:font-weight="normal" officeooo:rsid="0023b4ba" officeooo:paragraph-rsid="0023b4ba" style:font-weight-asian="normal" style:font-weight-complex="normal"/>
    </style:style>
    <style:style style:name="P41" style:family="paragraph" style:parent-style-name="Standard">
      <style:text-properties fo:font-weight="normal" officeooo:rsid="002592cb" officeooo:paragraph-rsid="0023b4ba" style:font-weight-asian="normal" style:font-weight-complex="normal"/>
    </style:style>
    <style:style style:name="P42" style:family="paragraph" style:parent-style-name="Standard">
      <style:text-properties fo:font-weight="normal" officeooo:rsid="002592cb" officeooo:paragraph-rsid="002592cb" style:font-weight-asian="normal" style:font-weight-complex="normal"/>
    </style:style>
    <style:style style:name="P43" style:family="paragraph" style:parent-style-name="Standard">
      <style:text-properties fo:font-weight="normal" officeooo:rsid="0027ae9e" officeooo:paragraph-rsid="0027ae9e" style:font-weight-asian="normal" style:font-weight-complex="normal"/>
    </style:style>
    <style:style style:name="P44" style:family="paragraph" style:parent-style-name="Standard">
      <style:text-properties fo:font-weight="normal" officeooo:rsid="0027ae9e" officeooo:paragraph-rsid="0028b2f0" style:font-weight-asian="normal" style:font-weight-complex="normal"/>
    </style:style>
    <style:style style:name="P45" style:family="paragraph" style:parent-style-name="Standard">
      <style:text-properties fo:font-weight="normal" officeooo:rsid="0028b2f0" officeooo:paragraph-rsid="0028b2f0" style:font-weight-asian="normal" style:font-weight-complex="normal"/>
    </style:style>
    <style:style style:name="P46" style:family="paragraph" style:parent-style-name="Standard">
      <style:text-properties fo:font-weight="normal" officeooo:rsid="002a54d8" officeooo:paragraph-rsid="0029468a" style:font-weight-asian="normal" style:font-weight-complex="normal"/>
    </style:style>
    <style:style style:name="P47" style:family="paragraph" style:parent-style-name="Standard">
      <style:text-properties fo:font-weight="normal" officeooo:rsid="002a54d8" officeooo:paragraph-rsid="002a54d8" style:font-weight-asian="normal" style:font-weight-complex="normal"/>
    </style:style>
    <style:style style:name="P48" style:family="paragraph" style:parent-style-name="Standard">
      <style:text-properties fo:font-weight="normal" officeooo:rsid="002b0e96" officeooo:paragraph-rsid="002b0e96" style:font-weight-asian="normal" style:font-weight-complex="normal"/>
    </style:style>
    <style:style style:name="P49" style:family="paragraph" style:parent-style-name="Standard">
      <style:text-properties fo:font-weight="normal" officeooo:rsid="002c4984" officeooo:paragraph-rsid="002c4984" style:font-weight-asian="normal" style:font-weight-complex="normal"/>
    </style:style>
    <style:style style:name="P50" style:family="paragraph" style:parent-style-name="Standard">
      <style:text-properties fo:font-weight="normal" officeooo:rsid="0031b39f" officeooo:paragraph-rsid="0031b39f" style:font-weight-asian="normal" style:font-weight-complex="normal"/>
    </style:style>
    <style:style style:name="P51" style:family="paragraph" style:parent-style-name="Standard">
      <style:text-properties fo:font-weight="normal" officeooo:rsid="002cb793" officeooo:paragraph-rsid="002cb793" style:font-weight-asian="normal" style:font-weight-complex="normal"/>
    </style:style>
    <style:style style:name="P52" style:family="paragraph" style:parent-style-name="Standard">
      <style:text-properties fo:font-weight="normal" officeooo:rsid="002e87f9" officeooo:paragraph-rsid="002e87f9" style:font-weight-asian="normal" style:font-weight-complex="normal"/>
    </style:style>
    <style:style style:name="P53" style:family="paragraph" style:parent-style-name="Standard">
      <style:text-properties fo:font-weight="normal" officeooo:rsid="002e87f9" officeooo:paragraph-rsid="002fdeab" style:font-weight-asian="normal" style:font-weight-complex="normal"/>
    </style:style>
    <style:style style:name="P54" style:family="paragraph" style:parent-style-name="Standard">
      <style:text-properties fo:font-weight="normal" officeooo:rsid="002e87f9" officeooo:paragraph-rsid="0031b39f" style:font-weight-asian="normal" style:font-weight-complex="normal"/>
    </style:style>
    <style:style style:name="P55" style:family="paragraph" style:parent-style-name="Standard">
      <style:text-properties fo:font-weight="normal" officeooo:rsid="001b6b8a" officeooo:paragraph-rsid="002e87f9" style:font-weight-asian="normal" style:font-weight-complex="normal"/>
    </style:style>
    <style:style style:name="P56" style:family="paragraph" style:parent-style-name="Standard">
      <style:text-properties fo:font-weight="normal" officeooo:rsid="0032776f" officeooo:paragraph-rsid="0032776f" style:font-weight-asian="normal" style:font-weight-complex="normal"/>
    </style:style>
    <style:style style:name="P57" style:family="paragraph" style:parent-style-name="Standard" style:list-style-name="L1">
      <style:text-properties officeooo:rsid="00091b2d" officeooo:paragraph-rsid="00091b2d"/>
    </style:style>
    <style:style style:name="P58" style:family="paragraph" style:parent-style-name="Standard" style:list-style-name="L1">
      <style:text-properties officeooo:rsid="00091b2d" officeooo:paragraph-rsid="000b18f4"/>
    </style:style>
    <style:style style:name="P59" style:family="paragraph" style:parent-style-name="Standard" style:list-style-name="L1">
      <style:text-properties officeooo:rsid="000a25ec" officeooo:paragraph-rsid="000a25ec"/>
    </style:style>
    <style:style style:name="P60" style:family="paragraph" style:parent-style-name="Standard" style:list-style-name="L1">
      <style:text-properties officeooo:rsid="00077d87" officeooo:paragraph-rsid="00077d87"/>
    </style:style>
    <style:style style:name="P61" style:family="paragraph" style:parent-style-name="Standard" style:list-style-name="L1">
      <style:text-properties officeooo:rsid="0019b07c" officeooo:paragraph-rsid="0019b07c"/>
    </style:style>
    <style:style style:name="P62" style:family="paragraph" style:parent-style-name="Standard" style:list-style-name="L2">
      <style:text-properties officeooo:rsid="001b6b8a" officeooo:paragraph-rsid="002e87f9"/>
    </style:style>
    <style:style style:name="P63" style:family="paragraph" style:parent-style-name="Standard" style:list-style-name="L3">
      <style:text-properties officeooo:rsid="001b6b8a" officeooo:paragraph-rsid="002e87f9"/>
    </style:style>
    <style:style style:name="P64" style:family="paragraph" style:parent-style-name="Standard" style:list-style-name="L3">
      <style:text-properties officeooo:rsid="001b6b8a" officeooo:paragraph-rsid="002fdeab"/>
    </style:style>
    <style:style style:name="T1" style:family="text">
      <style:text-properties officeooo:rsid="0003596e"/>
    </style:style>
    <style:style style:name="T2" style:family="text">
      <style:text-properties officeooo:rsid="00091b2d"/>
    </style:style>
    <style:style style:name="T3" style:family="text">
      <style:text-properties officeooo:rsid="000a25ec"/>
    </style:style>
    <style:style style:name="T4" style:family="text">
      <style:text-properties officeooo:rsid="000aadd8"/>
    </style:style>
    <style:style style:name="T5" style:family="text">
      <style:text-properties officeooo:rsid="000e16c1"/>
    </style:style>
    <style:style style:name="T6" style:family="text">
      <style:text-properties officeooo:rsid="001146a8"/>
    </style:style>
    <style:style style:name="T7" style:family="text">
      <style:text-properties officeooo:rsid="00131e44"/>
    </style:style>
    <style:style style:name="T8" style:family="text">
      <style:text-properties officeooo:rsid="001621f8"/>
    </style:style>
    <style:style style:name="T9" style:family="text">
      <style:text-properties officeooo:rsid="0017c2ab"/>
    </style:style>
    <style:style style:name="T10" style:family="text">
      <style:text-properties officeooo:rsid="00185b57"/>
    </style:style>
    <style:style style:name="T11" style:family="text">
      <style:text-properties officeooo:rsid="001dc42f"/>
    </style:style>
    <style:style style:name="T12" style:family="text">
      <style:text-properties fo:font-weight="normal" style:font-weight-asian="normal" style:font-weight-complex="normal"/>
    </style:style>
    <style:style style:name="T13" style:family="text">
      <style:text-properties fo:font-weight="normal" officeooo:rsid="001e2ab7" style:font-weight-asian="normal" style:font-weight-complex="normal"/>
    </style:style>
    <style:style style:name="T14" style:family="text">
      <style:text-properties fo:font-weight="normal" officeooo:rsid="001f665e" style:font-weight-asian="normal" style:font-weight-complex="normal"/>
    </style:style>
    <style:style style:name="T15" style:family="text">
      <style:text-properties fo:font-weight="normal" officeooo:rsid="00207ce3" style:font-weight-asian="normal" style:font-weight-complex="normal"/>
    </style:style>
    <style:style style:name="T16" style:family="text">
      <style:text-properties fo:font-weight="normal" officeooo:rsid="00220c21" style:font-weight-asian="normal" style:font-weight-complex="normal"/>
    </style:style>
    <style:style style:name="T17" style:family="text">
      <style:text-properties fo:font-weight="normal" officeooo:rsid="0024c3a7" style:font-weight-asian="normal" style:font-weight-complex="normal"/>
    </style:style>
    <style:style style:name="T18" style:family="text">
      <style:text-properties fo:font-weight="normal" officeooo:rsid="002592cb" style:font-weight-asian="normal" style:font-weight-complex="normal"/>
    </style:style>
    <style:style style:name="T19" style:family="text">
      <style:text-properties fo:font-weight="normal" officeooo:rsid="0025e615" style:font-weight-asian="normal" style:font-weight-complex="normal"/>
    </style:style>
    <style:style style:name="T20" style:family="text">
      <style:text-properties fo:font-weight="normal" officeooo:rsid="0027ae9e" style:font-weight-asian="normal" style:font-weight-complex="normal"/>
    </style:style>
    <style:style style:name="T21" style:family="text">
      <style:text-properties fo:font-weight="normal" officeooo:rsid="0028b2f0" style:font-weight-asian="normal" style:font-weight-complex="normal"/>
    </style:style>
    <style:style style:name="T22" style:family="text">
      <style:text-properties fo:font-weight="normal" officeooo:rsid="002a54d8" style:font-weight-asian="normal" style:font-weight-complex="normal"/>
    </style:style>
    <style:style style:name="T23" style:family="text">
      <style:text-properties fo:font-weight="normal" officeooo:rsid="002c4984" style:font-weight-asian="normal" style:font-weight-complex="normal"/>
    </style:style>
    <style:style style:name="T24" style:family="text">
      <style:text-properties fo:font-weight="normal" officeooo:rsid="002cb793" style:font-weight-asian="normal" style:font-weight-complex="normal"/>
    </style:style>
    <style:style style:name="T25" style:family="text">
      <style:text-properties fo:font-weight="normal" officeooo:rsid="002e87f9" style:font-weight-asian="normal" style:font-weight-complex="normal"/>
    </style:style>
    <style:style style:name="T26" style:family="text">
      <style:text-properties fo:font-weight="normal" officeooo:rsid="002fdeab" style:font-weight-asian="normal" style:font-weight-complex="normal"/>
    </style:style>
    <style:style style:name="T27" style:family="text">
      <style:text-properties fo:font-weight="normal" officeooo:rsid="00312599" style:font-weight-asian="normal" style:font-weight-complex="normal"/>
    </style:style>
    <style:style style:name="T28" style:family="text">
      <style:text-properties officeooo:rsid="00220c21"/>
    </style:style>
    <style:style style:name="T29" style:family="text">
      <style:text-properties officeooo:rsid="0024c3a7"/>
    </style:style>
    <style:style style:name="T30" style:family="text">
      <style:text-properties officeooo:rsid="002e87f9"/>
    </style:style>
    <style:style style:name="T31" style:family="text">
      <style:text-properties officeooo:rsid="002fdeab"/>
    </style:style>
    <style:style style:name="T32" style:family="text">
      <style:text-properties officeooo:rsid="0036c53d"/>
    </style:style>
    <style:style style:name="T33" style:family="text">
      <style:text-properties officeooo:rsid="0039a38d"/>
    </style:style>
    <style:style style:name="T34" style:family="text">
      <style:text-properties officeooo:rsid="003a6118"/>
    </style:style>
    <style:style style:name="T35" style:family="text">
      <style:text-properties officeooo:rsid="003c26b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elgian Meteorite Spectra Calibration</text:p>
      <text:p text:style-name="P25">2025-0<text:span text:style-name="T35">8-06</text:span></text:p>
      <text:p text:style-name="P25">Samu Syrjänen</text:p>
      <text:p text:style-name="P3"/>
      <text:p text:style-name="P3"/>
      <text:p text:style-name="P23">Calibration steps:</text:p>
      <text:list xml:id="list3118940482" text:style-name="L1">
        <text:list-item>
          <text:p text:style-name="P57">Analyze dark images to filter outliers and calculate average dark images</text:p>
        </text:list-item>
        <text:list-item>
          <text:p text:style-name="P59">Subtract dark images from meteorite images</text:p>
        </text:list-item>
        <text:list-item>
          <text:p text:style-name="P60">Match <text:span text:style-name="T4">acquisitions </text:span>that are going to be combined into a <text:span text:style-name="T2">reflectance </text:span>spectra</text:p>
        </text:list-item>
        <text:list-item>
          <text:p text:style-name="P60">Select areas <text:span text:style-name="T28">and</text:span> pixels for the spectra</text:p>
        </text:list-item>
        <text:list-item>
          <text:p text:style-name="P57"><text:span text:style-name="T29">Read and f</text:span>ilter <text:span text:style-name="T29">acquisition </text:span>setpoint<text:span text:style-name="T3">s</text:span><text:span text:style-name="T29"> from metadata</text:span></text:p>
        </text:list-item>
        <text:list-item>
          <text:p text:style-name="P60">Apply edge correction and derive wavelengths from setpoints</text:p>
        </text:list-item>
        <text:list-item>
          <text:p text:style-name="P60"><text:span text:style-name="T2">Read</text:span> calibration values from calibrati<text:span text:style-name="T3">o</text:span>n standards</text:p>
        </text:list-item>
        <text:list-item>
          <text:p text:style-name="P58">Read meteorite spectra values and derive reflectances</text:p>
        </text:list-item>
        <text:list-item>
          <text:p text:style-name="P61">Smooth the reflectance spectra</text:p>
        </text:list-item>
      </text:list>
      <text:p text:style-name="P24"/>
      <text:p text:style-name="P24"/>
      <text:p text:style-name="P7">1. <text:span text:style-name="T2">Analyze dark images to filter outliers and calculate average dark images</text:span></text:p>
      <text:p text:style-name="P25"/>
      <text:p text:style-name="P26">We first filter the diagnostic pixels from the sides of the dark images. Although diagnostic pixels covering only a few pixels from each side, it turned out that filtering a couple more pixel rows than necessary provided us with a more uniform statistics. We settled with filtering six pixels from each side of the image.</text:p>
      <text:p text:style-name="P26"/>
      <text:p text:style-name="P26">The entire image is then summarized into a mean and standard deviation. A histogram was used as a help to visualize the image values and spot outliers.<text:span text:style-name="T5"> To provide more accurate mean and standard deviation estimations, we filtered the outliers by discarding all unique values and values over 12000 from the images.</text:span></text:p>
      <text:p text:style-name="P26"/>
      <text:p text:style-name="P26"><draw:frame draw:style-name="fr1" draw:name="Image1" text:anchor-type="char" svg:width="17cm" svg:height="7.932cm" draw:z-index="0"><draw:image xlink:href="Pictures/1000000100001194000008340B2B21BE0EB25CEB.png" xlink:type="simple" xlink:show="embed" xlink:actuate="onLoad" draw:mime-type="image/png"/></draw:frame></text:p>
      <text:p text:style-name="P26"/>
      <text:p text:style-name="P27">Based on the means and standard deviations, we filtered out the specific dark images that clearly stood out as outliers when comared to other images of the same acquisition. The remaining dark images were then averaged together. As a result we have an average dark image for each <text:span text:style-name="T6">channel-exposure pair which can be used to calibrate the images.</text:span></text:p>
      <text:p text:style-name="P27"/>
      <text:p text:style-name="P27"><text:soft-page-break/></text:p>
      <text:p text:style-name="P8">2. Subtract dark images from meteorite images</text:p>
      <text:p text:style-name="P28"/>
      <text:p text:style-name="P29">The dark averages are now subtracted from the meteorite images<text:span text:style-name="T8"> and calibration standards</text:span> in order to normalize the pixel values. <text:span text:style-name="T7">Before the subtraction, si</text:span>x pixels<text:span text:style-name="T7"> are discarded from each side of the meteorite</text:span><text:span text:style-name="T8"> and calibration standard</text:span><text:span text:style-name="T7"> images, in a similar fashion as in the dark image calibration above.</text:span></text:p>
      <text:p text:style-name="P29"/>
      <text:p text:style-name="P29"/>
      <text:p text:style-name="P9">3. Match acquisitions that are going to be combined into a reflectance spectra</text:p>
      <text:p text:style-name="P30"/>
      <text:p text:style-name="P31">The data is matched based on meteorite name, channel,<text:span text:style-name="T9"> and</text:span> exposure<text:span text:style-name="T9">. Each spectra is a combination of the vis, nir1, and nir2 channels. In some cases, there are multiple similar acquisitions taken with differ</text:span><text:span text:style-name="T11">ent</text:span><text:span text:style-name="T9"> exposures. Some of the different exposure acquisitions are </text:span><text:span text:style-name="T10">more </text:span><text:span text:style-name="T9">saturated </text:span><text:span text:style-name="T10">than others, and the best individuals are selected from these candidates.</text:span><text:span text:style-name="T11"> Any overly saturated images are discarded.</text:span></text:p>
      <text:p text:style-name="P31"/>
      <text:p text:style-name="P31">Additionally, the corresponding dark averages, calibration standards, and metadata directories are linked to the meteorite images at this point.</text:p>
      <text:p text:style-name="P31"/>
      <text:p text:style-name="P31"/>
      <text:p text:style-name="P10">4. Select areas <text:span text:style-name="T28">and</text:span> pixels for the spectra</text:p>
      <text:p text:style-name="P35"/>
      <text:p text:style-name="P11"><text:span text:style-name="T12">The areas and pixels are selected from distinct meteorite </text:span><text:span text:style-name="T13">surface locations</text:span><text:span text:style-name="T14">. The basic idea is to read the values of the image pixels and combine them into a spectra. We gather a spectra for single pixels, 3x3 pixel binnings, and averaged </text:span><text:span text:style-name="T15">larger </text:span><text:span text:style-name="T14">areas.</text:span><text:span text:style-name="T13"> To combine a spectra from vis, nir1, and nir2 images, the meteorite shape and surface spots are used to identify identical spots on the meteorite.</text:span><text:span text:style-name="T14"> For the pixel spectras, some navigation lines are used </text:span><text:span text:style-name="T15">as a help to get more accurate locations from the meteorite surface. An example of an averaged area</text:span><text:span text:style-name="T12"> </text:span><text:span text:style-name="T15">and pixel locations can be seen in the below image</text:span><text:span text:style-name="T16">s</text:span><text:span text:style-name="T15">. </text:span><text:span text:style-name="T12">As a result, </text:span><text:span text:style-name="T13">each spectra corresponds to a single, semi accurately selected spot on the meteorite surface.</text:span></text:p>
      <text:p text:style-name="P36"/>
      <text:p text:style-name="P37"><draw:frame draw:style-name="fr3" draw:name="Image2" text:anchor-type="char" svg:x="-0.448cm" svg:y="0cm" svg:width="9.895cm" svg:height="5.937cm" draw:z-index="1"><draw:image xlink:href="Pictures/10000001000003E80000025843506D83E74F6EBC.png" xlink:type="simple" xlink:show="embed" xlink:actuate="onLoad" draw:mime-type="image/png"/></draw:frame><draw:frame draw:style-name="fr3" draw:name="Image3" text:anchor-type="char" svg:x="7.495cm" svg:y="0cm" svg:width="9.881cm" svg:height="5.928cm" draw:z-index="2"><draw:image xlink:href="Pictures/10000001000003E80000025831BDC9DA01D15DC4.png" xlink:type="simple" xlink:show="embed" xlink:actuate="onLoad" draw:mime-type="image/png"/></draw:frame><text:s/></text:p>
      <text:p text:style-name="P37"/>
      <text:p text:style-name="P34"><text:span text:style-name="T33">The following list d</text:span>escri<text:span text:style-name="T34">bes</text:span> the <text:span text:style-name="T32">coordinate locations of each single pixel and 3x3 binning </text:span>spectra<text:span text:style-name="T33">.</text:span></text:p>
      <text:p text:style-name="P5"/>
      <text:p text:style-name="P1">Allende</text:p>
      <text:p text:style-name="P2">0 - <text:span text:style-name="T1">CAI</text:span></text:p>
      <text:p text:style-name="P2">1 - <text:span text:style-name="T1">chondrule</text:span></text:p>
      <text:p text:style-name="P2">2 - dark matrix</text:p>
      <text:p text:style-name="P2"/>
      <text:p text:style-name="P1"><text:soft-page-break/>ElHammami</text:p>
      <text:p text:style-name="P2">0, 2 - dark spots</text:p>
      <text:p text:style-name="P2">1, 3 - bright spots</text:p>
      <text:p text:style-name="P2"/>
      <text:p text:style-name="P1">Iran0006</text:p>
      <text:p text:style-name="P2">0, 2 - <text:span text:style-name="T1">bright spot (</text:span>0<text:span text:style-name="T1"> chondrule?)</text:span></text:p>
      <text:p text:style-name="P2">1 - dark vein</text:p>
      <text:p text:style-name="P1"/>
      <text:p text:style-name="P1">Kilabo</text:p>
      <text:p text:style-name="P2">0, 2 - brighter material</text:p>
      <text:p text:style-name="P2">1 - dark shock vein</text:p>
      <text:p text:style-name="P2">3 - <text:span text:style-name="T1">distinct bright clast</text:span></text:p>
      <text:p text:style-name="P2"/>
      <text:p text:style-name="P4">SaU001</text:p>
      <text:p text:style-name="P38">0, 1 - dark spots</text:p>
      <text:p text:style-name="P12"/>
      <text:p text:style-name="P12"/>
      <text:p text:style-name="P12">5. Read and filter acquisition setpoints from metadata</text:p>
      <text:p text:style-name="P40"/>
      <text:p text:style-name="P12"><text:span text:style-name="T12">For each acquisition we need to </text:span><text:span text:style-name="T17">parse</text:span><text:span text:style-name="T12"> the config.json file to determine </text:span><text:span text:style-name="T17">what setpoints were used in the acquisitions</text:span><text:span text:style-name="T12">. </text:span><text:span text:style-name="T17">Each setpoint corresponds to a specific meteorite image. </text:span><text:span text:style-name="T18">The setpoints and images include some duplicates at the beginning of each acquisition sequence. These duplicates are discarded.</text:span></text:p>
      <text:p text:style-name="P41"/>
      <text:p text:style-name="P41"/>
      <text:p text:style-name="P13">6. Apply edge correction and derive wavelengths from setpoints</text:p>
      <text:p text:style-name="P42"/>
      <text:p text:style-name="P20"><text:span text:style-name="T18">A wavelength recalibration is done derive the wavelengths from the setpoints more accurately. </text:span><text:span text:style-name="T19">An e</text:span><text:span text:style-name="T18">dge calibration </text:span><text:span text:style-name="T19">image</text:span><text:span text:style-name="T18"> is provided for each</text:span><text:span text:style-name="T19"> setpoint and</text:span><text:span text:style-name="T18"> channel.</text:span><text:span text:style-name="T19"> The edge image average brightnesses are used to calculate the gradient or rate of change across the setpoints. A spline curve is then fit to the gradient in order to accurately interpolate between the setpoints and to find the setpoint value that gives the maximum gradient value. </text:span><text:span text:style-name="T20">The </text:span><text:span text:style-name="T19">middle most initial edge setpoint</text:span><text:span text:style-name="T20"> is then subtracted from t</text:span><text:span text:style-name="T19">his</text:span><text:span text:style-name="T20"> new</text:span><text:span text:style-name="T19"> setpoint</text:span><text:span text:style-name="T20"> to derive an edge correction that will be used in setpoint-wavelength transformation equations.</text:span></text:p>
      <text:p text:style-name="P43"/>
      <text:p text:style-name="P43"><draw:frame draw:style-name="fr2" draw:name="Image4" text:anchor-type="char" svg:width="17cm" svg:height="10.199cm" draw:z-index="3"><draw:image xlink:href="Pictures/10000001000003E80000025886993785362C6809.png" xlink:type="simple" xlink:show="embed" xlink:actuate="onLoad" draw:mime-type="image/png"/></draw:frame><text:soft-page-break/>The transformation equations for setpoint-to-wavelength conversions are as follows.</text:p>
      <text:p text:style-name="P43"/>
      <text:p text:style-name="P44">vis, low order:</text:p>
      <text:p text:style-name="P21"><text:span text:style-name="T21">wl =</text:span><text:span text:style-name="T12"> 0.1256 * (setpoint - edge correction) - 1511.3</text:span></text:p>
      <text:p text:style-name="P43"/>
      <text:p text:style-name="P45">vis, high order:</text:p>
      <text:p text:style-name="P45">wl = ((setpoint - edge correction) - 12275) / 11.25</text:p>
      <text:p text:style-name="P45"/>
      <text:p text:style-name="P45">nir1, low order:</text:p>
      <text:p text:style-name="P45">wl = 0.2696 * (setpoint - edge correction) - 3845.8</text:p>
      <text:p text:style-name="P45"/>
      <text:p text:style-name="P45">nir1, high order:</text:p>
      <text:p text:style-name="P45">wl = ((setpoint - edge correction) - 13866) / 7.6772</text:p>
      <text:p text:style-name="P45"/>
      <text:p text:style-name="P45">nir2, low order:</text:p>
      <text:p text:style-name="P45">wl = 0.2687 * (setpoint - edge correction) - 3872.6</text:p>
      <text:p text:style-name="P45"/>
      <text:p text:style-name="P45">nir2, high order:</text:p>
      <text:p text:style-name="P45">wl = ((setpoint - edge correction) - 14922) / 6.875</text:p>
      <text:p text:style-name="P45"/>
      <text:p text:style-name="P22"><text:span text:style-name="T12">The edge peak setpoints are then converted to wavelengths with the new edge correction and compared to the officially documented vis, nir1, and nir2 lower edge wavelengths. The resulting edge peak wavelengths are 649, 851, and 1181, whereas the officially documented vis, nir1, and nir2 lower edge wavelengths are 650, 850, 1200. Since the differences between vis and nir1 results are less than 10 nm, there is no need to apply edge correction when doing setpoint-wavelength conversions. Nir2 has a difference 19 nm so edge correction is needed for nir2.</text:span><text:span text:style-name="T22"> With this information we are now able to derive wavelengths for the meteorite spectra.</text:span></text:p>
      <text:p text:style-name="P46"/>
      <text:p text:style-name="P46"/>
      <text:p text:style-name="P14">7. Read calibration values from calibration standards</text:p>
      <text:p text:style-name="P47"/>
      <text:p text:style-name="P15"><text:soft-page-break/><text:span text:style-name="T12">The calibration standards are used to derive the reflectance from the image values. The same pixel and area locations are copied from the meteorite images. In cases where those areas are not properly covered by the calibration standard</text:span><text:span text:style-name="T23">,</text:span><text:span text:style-name="T12"> the calibration coordinates are adjusted slightly. An exampe</text:span><text:span text:style-name="T23"> Kilabo calibration standard</text:span><text:span text:style-name="T12"> is shown below.</text:span></text:p>
      <text:p text:style-name="P48"/>
      <text:p text:style-name="P49"><draw:frame draw:style-name="fr3" draw:name="Image5" text:anchor-type="char" svg:x="-0.222cm" svg:y="0cm" svg:width="9.446cm" svg:height="5.667cm" draw:z-index="4"><draw:image xlink:href="Pictures/10000001000003E800000258454DA3CB9739BDAD.png" xlink:type="simple" xlink:show="embed" xlink:actuate="onLoad" draw:mime-type="image/png"/></draw:frame><draw:frame draw:style-name="fr3" draw:name="Image6" text:anchor-type="char" svg:x="7.671cm" svg:y="0cm" svg:width="9.659cm" svg:height="5.794cm" draw:z-index="5"><draw:image xlink:href="Pictures/10000001000003E800000258500483C5644AC20F.png" xlink:type="simple" xlink:show="embed" xlink:actuate="onLoad" draw:mime-type="image/png"/></draw:frame><text:s/></text:p>
      <text:p text:style-name="P49"/>
      <text:p text:style-name="P16">8. Read meteorite spectra values and derive reflectances</text:p>
      <text:p text:style-name="P49"/>
      <text:p text:style-name="P16"><text:span text:style-name="T12">Finally, the results of the previous steps are combined to derive the </text:span><text:span text:style-name="T24">averaged, single pixel, and 3x3 binning </text:span><text:span text:style-name="T12">reflectance spectra for each selected acquisition set. The reflectances are calculated in the folowing way:<text:line-break/><text:line-break/>reflectance = image value / calibration standard value * 0.2</text:span></text:p>
      <text:p text:style-name="P49"/>
      <text:p text:style-name="P50">Example reflectance of averaged Kilabo:</text:p>
      <text:p text:style-name="P51"><draw:frame draw:style-name="fr2" draw:name="Image7" text:anchor-type="char" svg:width="17cm" svg:height="5.099cm" draw:z-index="6"><draw:image xlink:href="Pictures/10000001000007D000000258CB8C945A85F019E5.png" xlink:type="simple" xlink:show="embed" xlink:actuate="onLoad" draw:mime-type="image/png"/></draw:frame><text:s/></text:p>
      <text:p text:style-name="P51"/>
      <text:p text:style-name="P17">9. Smooth the reflectance spectra</text:p>
      <text:p text:style-name="P51"/>
      <text:p text:style-name="P18"><text:span text:style-name="T12">The post calibration adjusts the offsets for channels and deletes outliers in order to increase the quality of the spectra. As an example, we can see from the above image that the nir1 section (the middle) is visibly and consistently at a lower level that vis and nir2.</text:span><text:span text:style-name="T25"> Additionally the last measurement of the vis channel would be considered invalid outlier.</text:span></text:p>
      <text:p text:style-name="P52"/>
      <text:p text:style-name="P19"><text:span text:style-name="T12">To </text:span><text:span text:style-name="T25">address these problems, we </text:span><text:span text:style-name="T27">discard the last vis measurement from all spectra and </text:span><text:span text:style-name="T25">fit linear regressions to the last and first 3 measurements of nir1 and nir2 respectively. We then select a channel we want to adjust (nir1 or nir2), and calculate an offset for the values so that the two linear regressions cross each other exactly at the boundary of the channels.</text:span><text:span text:style-name="T26"> For the averaged Iran0006 spectra we additionally manually adjust the vis channel.</text:span><text:span text:style-name="T25"> The channel</text:span><text:span text:style-name="T27">s</text:span><text:span text:style-name="T25"> that </text:span><text:span text:style-name="T27">are</text:span><text:span text:style-name="T25"> adjusted</text:span><text:span text:style-name="T27"> </text:span><text:span text:style-name="T25">can be seen in the following list</text:span><text:span text:style-name="T27"> for each acquisition set</text:span><text:span text:style-name="T25">.</text:span></text:p>
      <text:p text:style-name="P55"><text:soft-page-break/></text:p>
      <text:p text:style-name="P32">Single pixel and 3x3 binning</text:p>
      <text:list xml:id="list810556404" text:style-name="L2">
        <text:list-item>
          <text:p text:style-name="P62">Sa<text:span text:style-name="T30">U001</text:span> - <text:span text:style-name="T30">N</text:span>o shift</text:p>
        </text:list-item>
        <text:list-item>
          <text:p text:style-name="P62">Kilabo - <text:span text:style-name="T30">S</text:span>hift NIR1</text:p>
        </text:list-item>
        <text:list-item>
          <text:p text:style-name="P62">ElHammami - <text:span text:style-name="T31">S</text:span>hift NIR2</text:p>
        </text:list-item>
        <text:list-item>
          <text:p text:style-name="P62">Iran0006 - <text:span text:style-name="T31">S</text:span>hift NIR2</text:p>
        </text:list-item>
        <text:list-item>
          <text:p text:style-name="P62">Allende - <text:span text:style-name="T31">S</text:span>hift NIR1</text:p>
        </text:list-item>
      </text:list>
      <text:p text:style-name="P32"/>
      <text:p text:style-name="P32">Averaged spectra</text:p>
      <text:list xml:id="list1145490525" text:style-name="L3">
        <text:list-item>
          <text:p text:style-name="P63">Allende - <text:span text:style-name="T31">S</text:span>hift NIR2</text:p>
        </text:list-item>
        <text:list-item>
          <text:p text:style-name="P63">ElHammami - <text:span text:style-name="T31">S</text:span>hift NIR1</text:p>
        </text:list-item>
        <text:list-item>
          <text:p text:style-name="P63">ElHammamiB<text:span text:style-name="T31"> </text:span>- <text:span text:style-name="T31">S</text:span>hift NIR2</text:p>
        </text:list-item>
        <text:list-item>
          <text:p text:style-name="P64">Iran00<text:span text:style-name="T31">0</text:span>6 - <text:span text:style-name="T31">S</text:span>hift NIR1 <text:span text:style-name="T31">and manually </text:span>adjust <text:span text:style-name="T31">VIS</text:span></text:p>
        </text:list-item>
        <text:list-item>
          <text:p text:style-name="P64"><text:span text:style-name="T25">Kilabo - </text:span><text:span text:style-name="T26">S</text:span><text:span text:style-name="T25">hift NIR1</text:span></text:p>
        </text:list-item>
      </text:list>
      <text:p text:style-name="P53"/>
      <text:p text:style-name="P33"><text:span text:style-name="T25">A</text:span><text:span text:style-name="T12">n example smoothed spectra of the averaged Kilabo:</text:span></text:p>
      <text:p text:style-name="P54"><draw:frame draw:style-name="fr1" draw:name="Image8" text:anchor-type="char" svg:width="17cm" svg:height="5.099cm" draw:z-index="7"><draw:image xlink:href="Pictures/10000001000007D000000258F4568CD87B0A8331.png" xlink:type="simple" xlink:show="embed" xlink:actuate="onLoad" draw:mime-type="image/png"/></draw:frame><text:s/></text:p>
      <text:p text:style-name="P54"/>
      <text:p text:style-name="P56"/>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8T11:50:35.458681421</meta:creation-date>
    <dc:date>2025-08-06T15:04:35.210116493</dc:date>
    <meta:editing-duration>PT5H52M20S</meta:editing-duration>
    <meta:editing-cycles>26</meta:editing-cycles>
    <meta:generator>LibreOffice/7.3.7.2$Linux_X86_64 LibreOffice_project/30$Build-2</meta:generator>
    <meta:document-statistic meta:table-count="0" meta:image-count="8" meta:object-count="0" meta:page-count="6" meta:paragraph-count="84" meta:word-count="1304" meta:character-count="7885" meta:non-whitespace-character-count="6675"/>
  </office:meta>
</office:document-meta>
</file>